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0d5071" officeooo:paragraph-rsid="000d5071"/>
    </style:style>
    <style:style style:name="P12" style:family="paragraph" style:parent-style-name="Text_20_body">
      <style:text-properties officeooo:rsid="000f9d58" officeooo:paragraph-rsid="000f9d58"/>
    </style:style>
    <style:style style:name="P13" style:family="paragraph" style:parent-style-name="Text_20_body">
      <style:text-properties officeooo:paragraph-rsid="0010b2db"/>
    </style:style>
    <style:style style:name="P14" style:family="paragraph" style:parent-style-name="Text_20_body">
      <style:paragraph-properties fo:break-before="page"/>
      <style:text-properties officeooo:rsid="0012086f" officeooo:paragraph-rsid="0012086f"/>
    </style:style>
    <style:style style:name="P15" style:family="paragraph" style:parent-style-name="Text_20_body">
      <style:text-properties officeooo:rsid="0012086f" officeooo:paragraph-rsid="0012086f"/>
    </style:style>
    <style:style style:name="P16" style:family="paragraph" style:parent-style-name="Text_20_body">
      <style:text-properties officeooo:rsid="0013bdce" officeooo:paragraph-rsid="0013bdce"/>
    </style:style>
    <style:style style:name="P17" style:family="paragraph" style:parent-style-name="Text_20_body">
      <style:text-properties fo:font-size="16pt" style:text-underline-style="solid" style:text-underline-width="auto" style:text-underline-color="font-color" fo:font-weight="bold" officeooo:rsid="0013bdce" officeooo:paragraph-rsid="0013bdce" style:font-size-asian="16pt" style:font-weight-asian="bold" style:font-size-complex="16pt" style:font-weight-complex="bold"/>
    </style:style>
    <style:style style:name="P18" style:family="paragraph" style:parent-style-name="Text_20_body">
      <style:text-properties fo:font-size="12pt" style:text-underline-style="none" fo:font-weight="normal" officeooo:rsid="0013bdce" officeooo:paragraph-rsid="0013bdce" style:font-size-asian="12pt" style:font-weight-asian="normal" style:font-size-complex="12pt" style:font-weight-complex="normal"/>
    </style:style>
    <style:style style:name="P19" style:family="paragraph" style:parent-style-name="Text_20_body">
      <style:paragraph-properties fo:break-before="page"/>
      <style:text-properties officeooo:rsid="0018970c" officeooo:paragraph-rsid="0018970c"/>
    </style:style>
    <style:style style:name="P20" style:family="paragraph" style:parent-style-name="Text_20_body">
      <style:text-properties officeooo:rsid="0018970c" officeooo:paragraph-rsid="0018970c"/>
    </style:style>
    <style:style style:name="P21" style:family="paragraph" style:parent-style-name="Text_20_body">
      <style:text-properties officeooo:rsid="0018f301" officeooo:paragraph-rsid="0018f301"/>
    </style:style>
    <style:style style:name="P22" style:family="paragraph" style:parent-style-name="Text_20_body">
      <style:text-properties officeooo:paragraph-rsid="0018f301"/>
    </style:style>
    <style:style style:name="P23" style:family="paragraph" style:parent-style-name="Footnote">
      <style:text-properties officeooo:rsid="0018f301" officeooo:paragraph-rsid="0018f301"/>
    </style:style>
    <style:style style:name="P24" style:family="paragraph" style:parent-style-name="Text_20_body" style:list-style-name="L1">
      <style:text-properties officeooo:paragraph-rsid="0018f301"/>
    </style:style>
    <style:style style:name="P25" style:family="paragraph" style:parent-style-name="Text_20_body" style:list-style-name="L11">
      <style:text-properties officeooo:paragraph-rsid="0018f301"/>
    </style:style>
    <style:style style:name="P26" style:family="paragraph" style:parent-style-name="Text_20_body" style:list-style-name="L12">
      <style:text-properties officeooo:paragraph-rsid="0018f301"/>
    </style:style>
    <style:style style:name="P27" style:family="paragraph" style:parent-style-name="Text_20_body" style:list-style-name="L13">
      <style:text-properties officeooo:paragraph-rsid="0018f301"/>
    </style:style>
    <style:style style:name="P28" style:family="paragraph" style:parent-style-name="Text_20_body" style:list-style-name="L14">
      <style:text-properties officeooo:paragraph-rsid="0018f301"/>
    </style:style>
    <style:style style:name="P29" style:family="paragraph" style:parent-style-name="Text_20_body" style:list-style-name="L15">
      <style:text-properties officeooo:paragraph-rsid="0018f301"/>
    </style:style>
    <style:style style:name="P30" style:family="paragraph" style:parent-style-name="Text_20_body" style:list-style-name="L16">
      <style:text-properties officeooo:paragraph-rsid="0018f301"/>
    </style:style>
    <style:style style:name="P31" style:family="paragraph" style:parent-style-name="Text_20_body" style:list-style-name="L17">
      <style:text-properties officeooo:paragraph-rsid="0018f301"/>
    </style:style>
    <style:style style:name="P32" style:family="paragraph" style:parent-style-name="Text_20_body" style:list-style-name="L18">
      <style:text-properties officeooo:paragraph-rsid="0018f301"/>
    </style:style>
    <style:style style:name="P33" style:family="paragraph" style:parent-style-name="Text_20_body" style:list-style-name="L19">
      <style:text-properties officeooo:paragraph-rsid="0018f301"/>
    </style:style>
    <style:style style:name="P34" style:family="paragraph" style:parent-style-name="Text_20_body">
      <style:text-properties officeooo:rsid="0018f301" officeooo:paragraph-rsid="001ad331"/>
    </style:style>
    <style:style style:name="P35" style:family="paragraph" style:parent-style-name="Footnote">
      <style:text-properties officeooo:rsid="001ad331" officeooo:paragraph-rsid="001ad331"/>
    </style:style>
    <style:style style:name="P36" style:family="paragraph" style:parent-style-name="Text_20_body">
      <style:text-properties officeooo:rsid="001ad331" officeooo:paragraph-rsid="001ad331"/>
    </style:style>
    <style:style style:name="P37" style:family="paragraph" style:parent-style-name="Text_20_body">
      <style:text-properties officeooo:rsid="001b089c" officeooo:paragraph-rsid="001b089c"/>
    </style:style>
    <style:style style:name="P38" style:family="paragraph" style:parent-style-name="Text_20_body">
      <style:text-properties fo:font-size="12pt" style:text-underline-style="none" fo:font-weight="normal" officeooo:rsid="001b089c" officeooo:paragraph-rsid="001b089c"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01be331" officeooo:paragraph-rsid="001be331"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013bdce" officeooo:paragraph-rsid="001b089c" style:font-size-asian="12pt" style:font-weight-asian="normal" style:font-size-complex="12pt" style:font-weight-complex="normal"/>
    </style:style>
    <style:style style:name="P41" style:family="paragraph" style:parent-style-name="Text_20_body">
      <style:text-properties fo:font-size="12pt" style:text-underline-style="none" fo:font-weight="normal" officeooo:rsid="001dec8c" officeooo:paragraph-rsid="001dec8c" style:font-size-asian="12pt" style:font-weight-asian="normal" style:font-size-complex="12pt" style:font-weight-complex="normal"/>
    </style:style>
    <style:style style:name="P42" style:family="paragraph" style:parent-style-name="Text_20_body">
      <style:text-properties fo:font-size="12pt" style:text-underline-style="none" fo:font-weight="normal" officeooo:rsid="001e6fed" officeooo:paragraph-rsid="001e6fed" style:font-size-asian="12pt" style:font-weight-asian="normal" style:font-size-complex="12pt" style:font-weight-complex="normal"/>
    </style:style>
    <style:style style:name="P43" style:family="paragraph" style:parent-style-name="Text_20_body">
      <style:paragraph-properties fo:break-before="page"/>
      <style:text-properties fo:font-size="12pt" style:text-underline-style="none" fo:font-weight="normal" officeooo:rsid="001b089c" officeooo:paragraph-rsid="001b089c" style:font-size-asian="12pt" style:font-weight-asian="normal" style:font-size-complex="12pt" style:font-weight-complex="normal"/>
    </style:style>
    <style:style style:name="T1" style:family="text">
      <style:text-properties officeooo:rsid="000d5071"/>
    </style:style>
    <style:style style:name="T2" style:family="text">
      <style:text-properties officeooo:rsid="000e7810"/>
    </style:style>
    <style:style style:name="T3" style:family="text">
      <style:text-properties officeooo:rsid="00141c16"/>
    </style:style>
    <style:style style:name="T4" style:family="text">
      <style:text-properties officeooo:rsid="001ad331"/>
    </style:style>
    <style:style style:name="T5" style:family="text">
      <style:text-properties style:font-name="Liberation Serif"/>
    </style:style>
    <style:style style:name="T6" style:family="text">
      <style:text-properties officeooo:rsid="001be331"/>
    </style:style>
    <style:style style:name="T7" style:family="text">
      <style:text-properties officeooo:rsid="001b089c"/>
    </style:style>
    <style:style style:name="T8" style:family="text">
      <style:text-properties officeooo:rsid="001ceef9"/>
    </style:style>
    <style:style style:name="T9" style:family="text">
      <style:text-properties officeooo:rsid="001dec8c"/>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as que mencionar en el informe</text:h>
      <text:p text:style-name="Text_20_body"/>
      <text:p text:style-name="Text_20_body"/>
      <text:p text:style-name="Text_20_body"/>
      <text:h text:style-name="Heading_20_2" text:outline-level="2">Furfi pide en la INTRO:</text:h>
      <text:p text:style-name="Text_20_body">* Cuales son y como habilitan los recursos de arquitectura de sistemas.</text:p>
      <text:p text:style-name="Text_20_body">Se entiende que tenemos que mencionar sobre qué recursos de hardware estamos construyendo el kernel y las aplicaciones. Por ej, para la interfaz de usuario tenemos que usar una gpu, usamos la virtual gpu que ofrece qemu, para el kernel estamos usando OpenSBI que no todo el hardware lo tiene</text:p>
      <text:p text:style-name="Text_20_body"><text:span text:style-name="Source_20_Text">virt</text:span> supports PCI, virtio, recent CPUs and large amounts of RAM. It also supports 64-bit CPUs.</text:p>
      <text:list xml:id="list3256459453" text:style-name="L1">
        <text:list-item>
          <text:p text:style-name="P1">Up to 512 generic RV32GC/RV64GC cores, with optional extensions</text:p>
        </text:list-item>
      </text:list>
      <text:list text:style-name="L2">
        <text:list-item>
          <text:p text:style-name="P2">Core Local Interruptor (CLINT)</text:p>
        </text:list-item>
      </text:list>
      <text:list text:style-name="L3">
        <text:list-item>
          <text:p text:style-name="P3">Platform-Level Interrupt Controller (PLIC)</text:p>
        </text:list-item>
      </text:list>
      <text:list text:style-name="L4">
        <text:list-item>
          <text:p text:style-name="P4">CFI parallel NOR flash memory</text:p>
        </text:list-item>
      </text:list>
      <text:list text:style-name="L5">
        <text:list-item>
          <text:p text:style-name="P5">1 NS16550 compatible UART</text:p>
        </text:list-item>
      </text:list>
      <text:list text:style-name="L6">
        <text:list-item>
          <text:p text:style-name="P6">1 Google Goldfish RTC</text:p>
        </text:list-item>
      </text:list>
      <text:list text:style-name="L7">
        <text:list-item>
          <text:p text:style-name="P7">1 SiFive Test device</text:p>
        </text:list-item>
      </text:list>
      <text:list text:style-name="L8">
        <text:list-item>
          <text:p text:style-name="P8">8 virtio-mmio transport devices</text:p>
        </text:list-item>
      </text:list>
      <text:list text:style-name="L9">
        <text:list-item>
          <text:p text:style-name="P9">1 generic PCIe host bridge</text:p>
        </text:list-item>
      </text:list>
      <text:list text:style-name="L10">
        <text:list-item>
          <text:p text:style-name="P10">The fw_cfg device that allows a guest to obtain data from QEMU</text:p>
        </text:list-item>
      </text:list>
      <text:p text:style-name="Text_20_body"/>
      <text:p text:style-name="Text_20_body">* Cual es la dirección de arranque y a que responde (puede ser en abstracto la que especifica RV, o pueden estar emulando algún hardware que reciba el control en una dirección específica.</text:p>
      <text:p text:style-name="P11">Esta va a ser la de risc v nomas, pero habría que fijarse en el manual qué onda</text:p>
      <text:p text:style-name="Text_20_body">* Que hardware están emulando si fuese el caso. De otro modo si es un sistema 100% emulado cual es su mapa de Memoria y de I/O y que es lo que utilizan para el proyecto. </text:p>
      <text:p text:style-name="Text_20_body">No estamos emulando ningún hardware particular, es risc v totalmente virtual y un kernel multipropósito, multitarea, etc y no uno para un uso específico. <text:span text:style-name="T1">El mapa de memoria creo que va con lo de </text:span><text:span text:style-name="T2">booteo y demas?</text:span></text:p>
      <text:p text:style-name="Text_20_body">* Que recursos de hardware hay en el sistema además de los temporizadores etc.</text:p>
      <text:p text:style-name="P11">Entiendo que gpu, interrupciones, reloj, </text:p>
      <text:h text:style-name="Heading_20_2" text:outline-level="2"><text:soft-page-break/>Cosas sueltas</text:h>
      <text:p text:style-name="Text_20_body">-</text:p>
      <text:p text:style-name="Text_20_body"/>
      <text:p text:style-name="P12">Cosa de interrupciones?</text:p>
      <text:p text:style-name="P13">aia=[none|aplic|aplic-imsic]</text:p>
      <text:p text:style-name="Text_20_body">This option allows selecting interrupt controller defined by the AIA (advanced interrupt architecture) specification. The “aia=aplic” selects APLIC (advanced platform level interrupt controller) to handle wired interrupts whereas the “aia=aplic-imsic” selects APLIC and IMSIC (incoming message signaled interrupt controller) to handle both wired interrupts and MSIs. When not specified, this option is assumed to be “none” which selects SiFive PLIC to handle wired interrupts.</text:p>
      <text:p text:style-name="Text_20_body">This option also interacts with ‘-accel kvm’. When using “aia=aplic-imsic” with KVM, it is possible to set the use of the kernel irqchip in split mode by using “-accel kvm,kernel-irqchip=split”. In this case the <text:span text:style-name="Source_20_Text">virt</text:span> machine will emulate the APLIC controller instead of using the APLIC controller from the irqchip. See <text:a xlink:type="simple" xlink:href="https://www.qemu.org/docs/master/specs/riscv-aia.html#riscv-aia" text:style-name="Internet_20_link" text:visited-style-name="Visited_20_Internet_20_Link">RISC-V AIA support for RISC-V machines</text:a> for more details on all available AIA modes.</text:p>
      <text:p text:style-name="Text_20_body"/>
      <text:p text:style-name="Text_20_body"/>
      <text:p text:style-name="P14">Le decimos a qemu que emule una pantalla de debugeo (-display sdl)</text:p>
      <text:p text:style-name="P15">¿Por qué elegimos la máquina virtual genérica en vez de emular un hardware específico?</text:p>
      <text:p text:style-name="P16">Nuestro proyecto se basa en un kernel multiproposito que pueda correr dentro de cualquier hardware con arquitectura risc-v por lo ello optamos por una opcion generica para poder estudiar el debugeo, luego decidiremos como estructuramos el driver grafico.</text:p>
      <text:p text:style-name="P16"/>
      <text:p text:style-name="P17">Avances:</text:p>
      <text:p text:style-name="P18">28/05:</text:p>
      <text:p text:style-name="P18">organizamos el proyecto del kernel, recodando y analizando los conceptos del libro “OS in 1000 lines”. Comenzamos a codear el archivo de kernel.ld, el cual mapea la memoria, donde fijamos el inicio del kernel en la posicion de memoria 0x80200000 <text:span text:style-name="T3">ya que en la posicion 0x80000000 esta ubicado el openSBI (el firmware). Luego alineamos cada seccion a 4 bytes, usamos KEEP para decirle al compilador que el .text.boot no es dead code. Por ultimo saltamos los primeros 128 kib los cuales estan reservados para el stack del kernel </text:span></text:p>
      <text:p text:style-name="P15"/>
      <text:p text:style-name="P19">Un informe es algo que informa :)<text:line-break/>pulgar arriba</text:p>
      <text:p text:style-name="P20">Introducción</text:p>
      <text:p text:style-name="P20">La idea de este trabajo es desarrollar un micro kernel para la arquitectura RISC-V de 32 bits, usando de referencia el micro kernel x86 implementado en la cursada de AyOC y comparando diferencias si las hubiere. Buscamos poder implementar un sistema de interrupciones acorde a la arquitectura RISC-V, paginación de memoria, scheduler multitarea, filesystem, además de programas de usuario para probar y un entorno visual con ventanas y manejo de escritorio simple.</text:p>
      <text:p text:style-name="P21">Para la virtualización usamos el modelo de placa ‘virt’ Generic Virtual Plataform, que no emula un procesador de hardware real, sino que está pensado para usarse en máquinas virtuales sin las limitaciones específicas que cada productor puede establecer en sus modelos. <text:span text:style-name="T4">Decidimos usar la versión genérica porque nos gustaría que este sistema se pueda adaptar a cualquier hardware más fácilmente.</text:span></text:p>
      <text:p text:style-name="P22"><text:span text:style-name="Source_20_Text"><text:span text:style-name="T5">virt</text:span></text:span> supports PCI, virtio, recent CPUs and large amounts of RAM. It also supports 64-bit CPUs.<text:note text:id="ftn0" text:note-class="footnote"><text:note-citation>1</text:note-citation><text:note-body><text:p text:style-name="P23">SACAR COSAS QUE NO USEMOS (opcional)</text:p></text:note-body></text:note></text:p>
      <text:list text:continue-list="list3256459453" text:style-name="L1">
        <text:list-item>
          <text:p text:style-name="P24">Up to 512 generic RV32GC/RV64GC cores, with optional extensions</text:p>
        </text:list-item>
      </text:list>
      <text:list text:style-name="L11">
        <text:list-item>
          <text:p text:style-name="P25">Core Local Interruptor (CLINT)</text:p>
        </text:list-item>
      </text:list>
      <text:list text:style-name="L12">
        <text:list-item>
          <text:p text:style-name="P26">Platform-Level Interrupt Controller (PLIC)</text:p>
        </text:list-item>
      </text:list>
      <text:list text:style-name="L13">
        <text:list-item>
          <text:p text:style-name="P27">CFI parallel NOR flash memory</text:p>
        </text:list-item>
      </text:list>
      <text:list text:style-name="L14">
        <text:list-item>
          <text:p text:style-name="P28">1 NS16550 compatible UART</text:p>
        </text:list-item>
      </text:list>
      <text:list text:style-name="L15">
        <text:list-item>
          <text:p text:style-name="P29">1 Google Goldfish RTC</text:p>
        </text:list-item>
      </text:list>
      <text:list text:style-name="L16">
        <text:list-item>
          <text:p text:style-name="P30">1 SiFive Test device</text:p>
        </text:list-item>
      </text:list>
      <text:list text:style-name="L17">
        <text:list-item>
          <text:p text:style-name="P31">8 virtio-mmio transport devices</text:p>
        </text:list-item>
      </text:list>
      <text:list text:style-name="L18">
        <text:list-item>
          <text:p text:style-name="P32">1 generic PCIe host bridge</text:p>
        </text:list-item>
      </text:list>
      <text:list text:style-name="L19">
        <text:list-item>
          <text:p text:style-name="P33">The fw_cfg device that allows a guest to obtain data from QEMU</text:p>
        </text:list-item>
      </text:list>
      <text:p text:style-name="P21">Para compilación usamos Clang y LLVM, LLD para linkear, porque estas herramientas están mejor optimizadas para compilar en RISC-V.</text:p>
      <text:p text:style-name="P21">Para <text:span text:style-name="T4">bootear usamos la dirección de arranque especificada por RISC-V al no estar emulando el hardware de un fabricante específico.</text:span></text:p>
      <text:p text:style-name="P34">* Que hardware están emulando si fuese el caso. De otro modo si es un sistema 100% emulado cual es su mapa de Memoria y de I/O y que es lo que utilizan para el proyecto. <text:note text:id="ftn1" text:note-class="footnote"><text:note-citation>2</text:note-citation><text:note-body><text:p text:style-name="P35">NI IDEA DE QUE ES ESTO</text:p></text:note-body></text:note></text:p>
      <text:p text:style-name="P36">En principio, el mapa de memoria no está definido, pero en la primer parte vamos a usar la UART y luego vamos a extener el kernel para que sea compatible con un teclado y pantalla emulados a través de virtio.</text:p>
      <text:p text:style-name="P36">* Que recursos de hardware hay en el sistema además de los temporizadores etc.<text:note text:id="ftn2" text:note-class="footnote"><text:note-citation>3</text:note-citation><text:note-body><text:p text:style-name="P35">CONSULTAR</text:p></text:note-body></text:note></text:p>
      <text:p text:style-name="P37"><text:soft-page-break/>Tomamos la decisión de escribir <text:span text:style-name="T6">todo el código que podamos en</text:span> C y lo que debe ser escrito en assembler hacerlo en un <text:span text:style-name="T6">archivo</text:span> aparte y no hacer inline assembler <text:span text:style-name="T6">porque nos parece más legible</text:span>.</text:p>
      <text:p text:style-name="P38">Makefile</text:p>
      <text:p text:style-name="P39">En el makefile hicimos las siguientes reglas:</text:p>
      <text:p text:style-name="P39">- debug</text:p>
      <text:p text:style-name="P38">Boot</text:p>
      <text:p text:style-name="P40"><text:span text:style-name="T7">El primer paso es definir el layout de memoria en </text:span>el archivo kernel.ld. <text:span text:style-name="T7">F</text:span>ijamos el inicio del kernel en la posicion de memoria 0x80200000 <text:span text:style-name="T3">ya que en la posición 0x80000000 esta ubicado el </text:span><text:span text:style-name="T7">O</text:span><text:span text:style-name="T3">penSBI (el firmware </text:span><text:span text:style-name="T7">estándar de RISC-V</text:span><text:span text:style-name="T3">). Luego, alineamos cada sección </text:span><text:span text:style-name="T7">de memoria (rodata, data, bss, stack)</text:span><text:span text:style-name="T3"> a 4 bytes </text:span><text:span text:style-name="T7">y</text:span><text:span text:style-name="T3"> usamos </text:span><text:span text:style-name="T7">la instrucción </text:span><text:span text:style-name="T3">KEEP para decirle al compilador que el .text.boot no es dead code. Por último saltamos los primeros 128 </text:span><text:span text:style-name="T7">kb,</text:span><text:span text:style-name="T3"> reservados para el stack del kernel.</text:span></text:p>
      <text:p text:style-name="P39">Hello world!</text:p>
      <text:p text:style-name="P39">El kernel arranca en la dirección definida en los pasos de arriba, en este caso es la tag ‘boot’ del archivo <text:span text:style-name="T8">supervisor</text:span>.S, <text:span text:style-name="T8">donde se </text:span><text:span text:style-name="T9">define </text:span><text:span text:style-name="T8">el stack pointer en la dirección </text:span><text:span text:style-name="T9">dada</text:span><text:span text:style-name="T8"> por kernel.ld, </text:span><text:span text:style-name="T9">luego se salta a kmain en kernel.c. Para escribir en pantalla se usa kputs de libc.c, que por cada carácter llama a kputc, que llama a OpenSBI para imprimir el carácter por el puerto UART.</text:span></text:p>
      <text:p text:style-name="P41">QEMU se encarga de enviar la salida del puerto UART a una ventana gráfica de SDL. En este caso lo configuramos así para tener por un lado en la terminal gdb corriendo y por otro tener el display de lo que sucede en el kernel. Otra manera hubiese sido que QEMU mande la salida del UART directamente al stout.</text:p>
      <text:p text:style-name="P42">Luego de imprimir en pantalla la función halt espera por interrupciones y sino hace un loop infinito.</text:p>
      <text:p text:style-name="P42">TODO</text:p>
      <text:p text:style-name="P42">- Explicar bien lo de memset</text:p>
      <text:p text:style-name="P43">Consultas</text:p>
      <text:p text:style-name="P38">¿qué onda usar palabras bastardizadas como “codear” “bootear”, podemos usarlas así o mejor decidirnos por usar el ingl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16:19:22.851794678</meta:creation-date>
    <dc:date>2026-06-10T18:06:04.750625456</dc:date>
    <meta:editing-duration>PT37M39S</meta:editing-duration>
    <meta:editing-cycles>3</meta:editing-cycles>
    <meta:generator>LibreOffice/25.8.7.3$Linux_X86_64 LibreOffice_project/580$Build-3</meta:generator>
    <meta:document-statistic meta:table-count="0" meta:image-count="0" meta:object-count="0" meta:page-count="6" meta:paragraph-count="70" meta:word-count="1253" meta:character-count="7372" meta:non-whitespace-character-count="6206"/>
  </office:meta>
</office:document-meta>
</file>